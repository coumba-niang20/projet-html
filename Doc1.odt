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60428in" svg:height="4.63966in" style:rel-width="scale" style:rel-height="scale"><draw:image xlink:href="media/image1.png" xlink:type="simple" xlink:show="embed" xlink:actuate="onLoad"/><svg:title/><svg:desc/></draw:frame><draw:frame draw:style-name="a1" draw:name="Image 1" text:anchor-type="as-char" svg:x="0in" svg:y="0in" svg:width="7.02398in" svg:height="1.27537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oumba Niang</meta:initial-creator>
    <dc:creator>Coumba Niang</dc:creator>
    <meta:creation-date>2026-04-18T16:47:00Z</meta:creation-date>
    <dc:date>2026-04-18T16:47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2" meta:row-count="1" meta:non-whitespace-character-count="2"/>
  </office:meta>
</office:document-meta>
</file>